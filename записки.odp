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00000014053927CBB.png" manifest:media-type="image/png"/>
  <manifest:file-entry manifest:full-path="Pictures/10000001000002370000016D69202930.png" manifest:media-type="image/png"/>
  <manifest:file-entry manifest:full-path="Pictures/100000010000040000000400698F4A35.png" manifest:media-type="image/png"/>
  <manifest:file-entry manifest:full-path="Pictures/10000000000002E0000002E0D961C1A0.png" manifest:media-type="image/png"/>
  <manifest:file-entry manifest:full-path="Pictures/TablePreview1.svm" manifest:media-type=""/>
  <manifest:file-entry manifest:full-path="Pictures/10000000000002EB00000228A74B1349.png" manifest:media-type="image/png"/>
  <manifest:file-entry manifest:full-path="Pictures/10000001000003C900000293A7157C08.png" manifest:media-type="image/png"/>
  <manifest:file-entry manifest:full-path="Pictures/1000000000000218000002FC97919612.png" manifest:media-type="image/png"/>
  <manifest:file-entry manifest:full-path="Pictures/10000001000002000000020088A26F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Filled_20_Red">
      <style:graphic-properties svg:stroke-color="#c5000b" draw:fill-gradient-name="Gradient_20_2" draw:textarea-horizontal-align="justify" draw:textarea-vertical-align="top" draw:auto-grow-height="false" fo:min-height="10cm" fo:min-width="5cm" loext:decorative="false"/>
      <style:paragraph-properties style:writing-mode="lr-tb"/>
    </style:style>
    <style:style style:name="gr6" style:family="graphic" style:parent-style-name="Filled_20_Yellow">
      <style:graphic-properties draw:auto-grow-height="true" draw:auto-grow-width="false" fo:min-height="10.5cm" loext:decorative="false"/>
      <style:paragraph-properties style:writing-mode="lr-tb"/>
    </style:style>
    <style:style style:name="gr7" style:family="graphic" style:parent-style-name="Filled_20_Green">
      <style:graphic-properties svg:stroke-color="#000000" draw:auto-grow-height="true" draw:auto-grow-width="false" fo:min-height="5.5cm" loext:decorative="false"/>
      <style:paragraph-properties style:writing-mode="lr-tb"/>
    </style:style>
    <style:style style:name="gr8" style:family="graphic" style:parent-style-name="Arrow_20_Line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Arrow_20_Line">
      <style:graphic-properties draw:stroke="none" svg:stroke-color="#000000" draw:fill="none" draw:fill-color="#ffffff" draw:textarea-horizontal-align="left" draw:auto-grow-height="true" draw:auto-grow-width="false" fo:min-height="11cm" fo:min-width="0cm" loext:decorative="false"/>
      <style:paragraph-properties style:writing-mode="lr-tb"/>
    </style:style>
    <style:style style:name="gr10" style:family="graphic" style:parent-style-name="Arrow_20_Line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1" style:family="graphic" style:parent-style-name="Arrow_20_Line">
      <style:graphic-properties draw:stroke="none" svg:stroke-color="#000000" draw:fill="none" draw:fill-color="#ffffff" draw:auto-grow-height="true" draw:auto-grow-width="false" fo:min-height="12cm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3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fo:min-height="1.869cm" loext:decorative="false"/>
      <style:paragraph-properties style:writing-mode="lr-tb"/>
    </style:style>
    <style:style style:name="pr6" style:family="presentation" style:parent-style-name="Обычный-title">
      <style:graphic-properties draw:textarea-vertical-align="top" fo:min-height="1.372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2.334cm" style:use-optimal-row-height="false"/>
    </style:style>
    <style:style style:name="ro3" style:family="table-row">
      <style:table-row-properties style:row-height="3.045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botto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fo:font-size="14pt" fo:font-style="normal" fo:text-shadow="none" style:text-underline-style="none" style:letter-kerning="true" style:font-name-asian="Microsoft YaHei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2cm" fo:margin-bottom="0.05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02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2cm" fo:margin-bottom="0.1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P12" style:family="paragraph">
      <loext:graphic-properties draw:fill-gradient-name="Gradient_20_2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margin-top="0cm" fo:margin-bottom="0cm" fo:text-align="center" loext:tab-stop-distance="0cm">
        <style:tab-stops/>
      </style:paragraph-properties>
    </style:style>
    <style:style style:name="P14" style:family="paragraph">
      <style:paragraph-properties fo:margin-top="0.22cm" fo:margin-bottom="0.15cm" fo:text-align="center" loext:tab-stop-distance="0cm">
        <style:tab-stops/>
      </style:paragraph-properties>
      <style:text-properties style:font-size-asian="10pt" style:font-size-complex="10pt"/>
    </style:style>
    <style:style style:name="P15" style:family="paragraph">
      <style:paragraph-properties fo:margin-top="0.42cm" fo:margin-bottom="0.35cm" fo:text-align="center"/>
      <style:text-properties style:font-size-asian="10pt" style:font-size-complex="10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Arial1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8pt" style:font-size-complex="18pt"/>
    </style:style>
    <style:style style:name="T13" style:family="text">
      <style:text-properties fo:font-size="15pt" style:font-size-asian="21pt" style:font-size-complex="21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801cm" svg:y="4.371cm" presentation:class="title" presentation:user-transformed="true">
          <draw:text-box>
            <text:p><text:span text:style-name="T1">Генератор объяснительных</text:span><text:span text:style-name="T1"><text:line-break/></text:span><text:span text:style-name="T1">для деканата</text:span></text:p>
          </draw:text-box>
        </draw:frame>
        <draw:frame presentation:style-name="pr2" draw:text-style-name="P1" draw:layer="layout" svg:width="15.126cm" svg:height="3cm" svg:x="16.5cm" svg:y="13.5cm" presentation:class="subtitle" presentation:user-transformed="true">
          <draw:text-box>
            <text:p><text:span text:style-name="T2">Тимлид: Дауталиев Нурэл</text:span></text:p>
          </draw:text-box>
        </draw:frame>
        <draw:frame draw:style-name="gr1" draw:text-style-name="P3" draw:layer="layout" svg:width="14cm" svg:height="2.306cm" svg:x="8cm" svg:y="0.194cm">
          <draw:text-box>
            <text:p text:style-name="P2"><text:span text:style-name="T3">Частное профессиональное образовательное учреждение</text:span></text:p>
            <text:p text:style-name="P2"><text:span text:style-name="T3">«Новосибирский Кооперативный Техникум Имени А.Н. Косыгина</text:span></text:p>
            <text:p text:style-name="P2"><text:span text:style-name="T3">Новосибирского Облпотребсоюза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16.6cm" svg:height="10.5cm" svg:x="1cm" svg:y="2.5cm" presentation:class="outline" presentation:user-transformed="true">
          <draw:text-box>
            <text:list text:style-name="L4">
              <text:list-item>
                <text:p text:style-name="P4"><text:span text:style-name="T4">Тимлид: Даутилиев Нурэл — Умеет координировать команду и быстро принимает решения.</text:span></text:p>
                <text:p text:style-name="P4"><text:span text:style-name="T4"/></text:p>
              </text:list-item>
              <text:list-item>
                <text:p text:style-name="P4"><text:span text:style-name="T4">Разработчик: Файзулин Самир — Занимался основной логикой программы.</text:span></text:p>
                <text:p text:style-name="P4"><text:span text:style-name="T4"/></text:p>
              </text:list-item>
              <text:list-item>
                <text:p text:style-name="P4"><text:span text:style-name="T4">Дизайнер: Патрин Константин — Умеет структурировать информацию.</text:span></text:p>
                <text:p text:style-name="P4"><text:span text:style-name="T4"/></text:p>
              </text:list-item>
              <text:list-item>
                <text:p text:style-name="P4"><text:span text:style-name="T4">Тестировщик: Чернов Дмитрий — Вниматеьно анализирует возможные проблемные сценарии.</text:span></text:p>
                <text:p text:style-name="P4"><text:span text:style-name="T4"/></text:p>
              </text:list-item>
              <text:list-item>
                <text:p text:style-name="P4"><text:span text:style-name="T4">Технический писатель: Сероваткин Максим — Фиксировал изменения и сценарии работы программы.</text:span></text:p>
              </text:list-item>
            </text:list>
          </draw:text-box>
        </draw:frame>
        <draw:frame presentation:style-name="pr5" draw:layer="layout" svg:width="12.5cm" svg:height="1.869cm" svg:x="7cm" svg:y="0.631cm" presentation:class="title" presentation:user-transformed="true">
          <draw:text-box>
            <text:p><text:span text:style-name="T5">Состав команды:</text:span></text:p>
          </draw:text-box>
        </draw:frame>
        <draw:frame draw:style-name="gr3" draw:text-style-name="P2" draw:layer="layout" svg:width="8.466cm" svg:height="8.466cm" svg:x="18.034cm" svg:y="3.5cm">
          <draw:image xlink:href="Pictures/10000000000001400000014053927C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4" draw:text-style-name="P5" draw:layer="layout" svg:width="11.05cm" svg:height="4.808cm" svg:x="0.45cm" svg:y="0.192cm">
          <draw:text-box>
            <text:p>Канбан-доска «Спасательный круг»</text:p>
            <text:p/>
            <text:p><text:span text:style-name="T2">Время выполнения: 2 часа 25 минут</text:span></text:p>
            <text:p><text:span text:style-name="T2"/></text:p>
            <text:p><text:span text:style-name="T2">Состав команды: 5 человек</text:span></text:p>
            <text:p><text:span text:style-name="T2"/></text:p>
            <text:p><text:span text:style-name="T2">Дата:07/05/26</text:span></text:p>
          </draw:text-box>
        </draw:frame>
        <draw:custom-shape draw:style-name="gr5" draw:text-style-name="P12" draw:layer="layout" svg:width="5cm" svg:height="10cm" svg:x="11.5cm" svg:y="0.5cm">
          <text:p text:style-name="P6"><text:span text:style-name="T6"/></text:p>
          <text:p text:style-name="P6"><text:span text:style-name="T6">Срочно</text:span></text:p>
          <text:p text:style-name="P6"><text:span text:style-name="T6"/></text:p>
          <text:p text:style-name="P7"><text:span text:style-name="T7">Создать решение С#</text:span></text:p>
          <text:p text:style-name="P7"><text:span text:style-name="T7"/></text:p>
          <text:p text:style-name="P7"><text:span text:style-name="T7">Реализовать</text:span></text:p>
          <text:p text:style-name="P7"><text:span text:style-name="T7">Проверку</text:span></text:p>
          <text:p text:style-name="P7"><text:span text:style-name="T7"><text:s/></text:span><text:span text:style-name="T7">наличия файлов </text:span></text:p>
          <text:p text:style-name="P7"><text:span text:style-name="T8"/></text:p>
          <text:p text:style-name="P8"><text:span text:style-name="T9">Написать генератор</text:span></text:p>
          <text:p text:style-name="P9"><text:span text:style-name="T9"><text:s/></text:span><text:span text:style-name="T9">шаблона записки</text:span></text:p>
          <text:p text:style-name="P9"><text:span text:style-name="T9"><text:s/></text:span></text:p>
          <text:p text:style-name="P10"><text:span text:style-name="T9">Реализовать цикл</text:span></text:p>
          <text:p text:style-name="P10"><text:span text:style-name="T9">генерации файлов </text:span><text:span text:style-name="T9"><text:line-break/></text:span><text:span text:style-name="T9"/></text:p>
          <text:p text:style-name="P11"><text:span text:style-name="T9">Создать систему</text:span></text:p>
          <text:p text:style-name="P11"><text:span text:style-name="T9">именования файлов </text:span></text:p>
          <text:p text:style-name="P7"><text:span text:style-name="T10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cm" svg:height="10.5cm" svg:x="17cm" svg:y="0.5cm">
          <draw:text-box>
            <text:p text:style-name="P2"/>
            <text:p text:style-name="P13"><text:s/>Medium</text:p>
            <text:p text:style-name="P13"/>
            <text:p text:style-name="P14"><text:span text:style-name="T11">Реализовать создание папки </text:span></text:p>
            <text:p text:style-name="P14"><text:span text:style-name="T11">Подготовить тестовые файлы (students.txt, reasons.txt) </text:span></text:p>
            <text:p text:style-name="P15"><text:span text:style-name="T11">Прогнать тесты (нет файлов, пустые, отрицательные) </text:span></text:p>
            <text:p text:style-name="P15"><text:span text:style-name="T11">Прогнать тесты (нет файлов, пустые, отрицательные) </text:span></text:p>
            <text:p text:style-name="P15"><text:span text:style-name="T11">Подготовить презентацию (10 слайдов) </text:span></text:p>
          </draw:text-box>
        </draw:frame>
        <draw:frame draw:style-name="gr7" draw:text-style-name="P2" draw:layer="layout" svg:width="5cm" svg:height="5.5cm" svg:x="22.5cm" svg:y="0.5cm">
          <draw:text-box>
            <text:p text:style-name="P2"/>
            <text:p text:style-name="P2">Low</text:p>
            <text:p text:style-name="P2"/>
            <text:p text:style-name="P2"><text:span text:style-name="T11">Написать комментарии к коду с указанием авторов </text:span></text:p>
            <text:p text:style-name="P15"><text:span text:style-name="T11">Задокументировать форс-мажорный план </text:span></text:p>
          </draw:text-box>
        </draw:frame>
        <draw:frame draw:style-name="gr3" draw:text-style-name="P2" draw:layer="layout" svg:width="9.5cm" svg:height="9.5cm" svg:x="1cm" svg:y="5cm">
          <draw:image xlink:href="Pictures/10000000000002E0000002E0D961C1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8" draw:text-style-name="P5" draw:layer="layout" svg:width="5.78cm" svg:height="0.712cm" svg:x="11.5cm" svg:y="0.5cm">
          <draw:text-box>
            <text:p>Тестовый документ</text:p>
          </draw:text-box>
        </draw:frame>
        <draw:frame draw:style-name="gr9" draw:text-style-name="P5" draw:layer="layout" svg:width="25.5cm" svg:height="11cm" svg:x="1.5cm" svg:y="2.5cm">
          <draw:text-box>
            <text:p>1. Тестовые файлы students.txt и reasons.txt</text:p>
            <text:p>2. Пример сгенерированной записки:</text:p>
            <text:p>Заведующему отделением (очного обучения)</text:p>
            <text:p/>
            <text:p><text:span text:style-name="T12">От студента: Иванов И.И.</text:span></text:p>
            <text:p><text:span text:style-name="T12">Группа: ИС-51</text:span></text:p>
            <text:p/>
            <text:p><text:span text:style-name="T13">ОБЪЯСНИТЕЛЬНАЯ ЗАПИСКА</text:span></text:p>
            <text:p/>
            <text:p><text:span text:style-name="T12">Я, Иванов И.И., отсутствовал(а) на занятиях по уважительной причине:</text:span></text:p>
            <text:p><text:span text:style-name="T12">"Застрял в лифте".</text:span></text:p>
            <text:p/>
            <text:p><text:span text:style-name="T12">Обязуюсь изучить пропущенный материал самостоятельно и впредь посещать все пары по дисциплине "Управление проектами". </text:span><text:span text:style-name="T7">Прошу не оценивать меня строго, больше такого не повторится.</text:span></text:p>
            <text:p><text:span text:style-name="T12">Дата: 07.05.2026</text:span></text:p>
            <text:p><text:span text:style-name="T12">Подпись: ______</text:span></text:p>
          </draw:text-box>
        </draw:frame>
        <draw:frame draw:style-name="gr3" draw:text-style-name="P2" draw:layer="layout" svg:width="8cm" svg:height="8cm" svg:x="18cm" svg:y="0.5cm">
          <draw:image xlink:href="Pictures/100000010000040000000400698F4A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3" draw:text-style-name="P2" draw:layer="layout" svg:width="18.086cm" svg:height="13.365cm" svg:x="4.414cm" svg:y="1.5cm">
          <draw:image xlink:href="Pictures/10000000000002EB00000228A74B1349.png" xlink:type="simple" xlink:show="embed" xlink:actuate="onLoad" draw:mime-type="image/png">
            <text:p/>
          </draw:image>
        </draw:frame>
        <draw:frame draw:style-name="gr10" draw:text-style-name="P5" draw:layer="layout" svg:width="6.5cm" svg:height="1cm" svg:x="9.5cm" svg:y="0.5cm">
          <draw:text-box>
            <text:p>Тестовый <text:s/>сценарий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6" draw:layer="layout" svg:width="25.199cm" svg:height="2.629cm" svg:x="1.301cm" svg:y="-0.5cm" presentation:class="title" presentation:user-transformed="true">
          <draw:text-box>
            <text:p text:style-name="P16"><text:span text:style-name="T5">Фрагменты кода</text:span></text:p>
          </draw:text-box>
        </draw:frame>
        <draw:frame draw:style-name="gr3" draw:text-style-name="P2" draw:layer="layout" svg:width="19.85cm" svg:height="13.5cm" svg:x="4.15cm" svg:y="1.5cm">
          <draw:image xlink:href="Pictures/10000001000003C900000293A7157C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17" draw:layer="layout" svg:width="13.6cm" svg:height="1.372cm" svg:x="7.4cm" svg:y="0.128cm" presentation:class="title" presentation:user-transformed="true">
          <draw:text-box>
            <text:p text:style-name="P17"><text:span text:style-name="T14">Алгоритм работы</text:span></text:p>
          </draw:text-box>
        </draw:frame>
        <draw:frame draw:style-name="gr3" draw:text-style-name="P2" draw:layer="layout" svg:width="10.173cm" svg:height="14.5cm" svg:x="8.827cm" svg:y="1.25cm">
          <draw:image xlink:href="Pictures/1000000000000218000002FC97919612.png" xlink:type="simple" xlink:show="embed" xlink:actuate="onLoad" draw:mime-type="image/png">
            <text:p/>
          </draw:image>
        </draw:frame>
        <draw:frame draw:style-name="gr3" draw:text-style-name="P2" draw:layer="layout" svg:width="7.5cm" svg:height="7.5cm" svg:x="1.327cm" svg:y="2cm">
          <draw:image xlink:href="Pictures/10000001000002000000020088A26F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18" draw:layer="layout" svg:width="25.199cm" svg:height="2.629cm" svg:x="1.5cm" svg:y="0cm" presentation:class="title" presentation:user-transformed="true">
          <draw:text-box>
            <text:p text:style-name="P18"><text:span text:style-name="T15">Работа с вводными</text:span></text:p>
          </draw:text-box>
        </draw:frame>
        <draw:frame draw:style-name="gr3" draw:text-style-name="P2" draw:layer="layout" svg:width="17.866cm" svg:height="11.5cm" svg:x="5.634cm" svg:y="3cm">
          <draw:image xlink:href="Pictures/10000001000002370000016D6920293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20" draw:layer="layout" svg:width="25.199cm" svg:height="2.629cm" svg:x="0.801cm" svg:y="-0.5cm" presentation:class="title" presentation:user-transformed="true">
          <draw:text-box>
            <text:p text:style-name="P20"><text:span text:style-name="T16">Итоговый интерфейс</text:span></text:p>
          </draw:text-box>
        </draw:frame>
        <draw:frame draw:style-name="gr11" draw:text-style-name="P23" draw:layer="layout" svg:width="8.5cm" svg:height="12.67cm" svg:x="0.5cm" svg:y="2.33cm">
          <draw:text-box>
            <text:p text:style-name="P21"><text:span text:style-name="T2">Что представляет собой интерфейс</text:span></text:p>
            <text:list text:style-name="L5">
              <text:list-item>
                <text:p text:style-name="P22"><text:span text:style-name="T2">Консольное приложение (согласно ТЗ: «только хардкор, без сложного UI»)</text:span></text:p>
              </text:list-item>
              <text:list-item>
                <text:p text:style-name="P22"><text:span text:style-name="T2">Экран разделён на логические блоки:</text:span></text:p>
              </text:list-item>
              <text:list-item>
                <text:p text:style-name="P22"><text:span text:style-name="T2">Приветствие и статус файлов (найдены / резерв)</text:span></text:p>
              </text:list-item>
              <text:list-item>
                <text:p text:style-name="P22"><text:span text:style-name="T2">Запрос количества записок (+защита от дурака)</text:span></text:p>
              </text:list-item>
              <text:list-item>
                <text:p text:style-name="P22"><text:span text:style-name="T2">Ход генерации (построчно)</text:span></text:p>
              </text:list-item>
              <text:list-item>
                <text:p text:style-name="P22"><text:span text:style-name="T2">Итоговый отчёт (путь, количество файлов)</text:span></text:p>
              </text:list-item>
            </text:list>
            <text:p text:style-name="P22"/>
          </draw:text-box>
        </draw:frame>
        <draw:frame draw:style-name="gr12" draw:layer="layout" svg:width="14.098cm" svg:height="13.292cm" svg:x="12.225cm" svg:y="1.6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Критерий</text:p>
              </table:table-cell>
              <table:table-cell>
                <text:p text:style-name="P2">Обоснование</text:p>
              </table:table-cell>
            </table:table-row>
            <table:table-row table:style-name="ro2">
              <table:table-cell table:style-name="ce1">
                <text:p text:style-name="P2">Время разработки </text:p>
              </table:table-cell>
              <table:table-cell table:style-name="ce2">
                <text:p text:style-name="P2">10 минут на ввод-вывод против 2 часов на формы </text:p>
              </table:table-cell>
            </table:table-row>
            <table:table-row table:style-name="ro3">
              <table:table-cell table:style-name="ce1">
                <text:p text:style-name="P2">Надёжность </text:p>
              </table:table-cell>
              <table:table-cell table:style-name="ce2">
                <text:p text:style-name="P2">Не ломается от разрешений экрана, библиотек, версий .NET </text:p>
              </table:table-cell>
            </table:table-row>
            <table:table-row table:style-name="ro2" table:default-cell-style-name="ce2">
              <table:table-cell>
                <text:p text:style-name="P2">Читаемость </text:p>
              </table:table-cell>
              <table:table-cell>
                <text:p text:style-name="P2">Староста или декан могут прочитать логи прямо в консоли </text:p>
              </table:table-cell>
            </table:table-row>
            <table:table-row table:style-name="ro2" table:default-cell-style-name="ce2">
              <table:table-cell>
                <text:p text:style-name="P2">Соответствие ТЗ </text:p>
              </table:table-cell>
              <table:table-cell>
                <text:p text:style-name="P2">Прямое указание: «Писать сложный UI некогда. Или консоль» </text:p>
              </table:table-cell>
            </table:table-row>
            <table:table-row table:style-name="ro2">
              <table:table-cell table:style-name="ce2">
                <text:p text:style-name="P2">Массовая генерация </text:p>
              </table:table-cell>
              <table:table-cell table:style-name="ce3">
                <text:p text:style-name="P2">Не требует кликов мышью, только ввод числа + Enter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ff0000" draw:end-color="#ff0000" draw:start-intensity="100%" draw:end-intensity="100%" draw:angle="30deg" draw:border="0%">
      <loext:gradient-stop svg:offset="1" loext:color-type="rgb" loext:color-value="#ff0000"/>
    </draw:gradient>
    <draw:gradient draw:name="Gradient_20_3" draw:display-name="Gradient 3" draw:style="axial" draw:start-color="#ff8200" draw:end-color="#ff8200" draw:start-intensity="100%" draw:end-intensity="100%" draw:angle="30deg" draw:border="0%">
      <loext:gradient-stop svg:offset="1" loext:color-type="rgb" loext:color-value="#ff82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="gradient" draw:fill-gradient-name="Gradient_20_2" draw:gradient-step-count="0" draw:shadow-color="#000000"/>
      <style:paragraph-properties loext:tab-stop-distance="0cm">
        <style:tab-stops/>
      </style:paragraph-properties>
      <style:text-properties fo:color="#ffffff" loext:opacity="100%"/>
    </style:style>
    <style:style style:name="Filled_20_Yellow" style:display-name="Filled Yellow" style:family="graphic" style:parent-style-name="Filled">
      <style:graphic-properties draw:fill="gradient" draw:fill-gradient-name="Gradient_20_3" draw:gradient-step-count="0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Горизонтальная_20_линия" style:display-name="Горизонтальная линия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indent="0cm"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07T08:40:35.816000000</meta:creation-date>
    <dc:date>2026-05-07T10:30:34.377000000</dc:date>
    <meta:editing-duration>PT4M25S</meta:editing-duration>
    <meta:editing-cycles>1</meta:editing-cycles>
    <meta:document-statistic meta:object-count="65"/>
    <meta:generator>LibreOffice/24.8.0.3$Windows_X86_64 LibreOffice_project/0bdf1299c94fe897b119f97f3c613e9dca6be583</meta:generator>
  </office:meta>
</office:document-meta>
</file>